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2D03BEAED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12e03" officeooo:paragraph-rsid="00112e03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Times New Roman" fo:font-size="12pt" officeooo:rsid="00112e03" officeooo:paragraph-rsid="00112e03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12e03" officeooo:paragraph-rsid="00112e0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Times New Roman" fo:font-size="12pt" officeooo:rsid="00112e03" officeooo:paragraph-rsid="00112e03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12e03" officeooo:paragraph-rsid="00112e03" style:font-size-asian="10.5pt" style:font-size-complex="12pt"/>
    </style:style>
    <style:style style:name="P6" style:family="paragraph" style:parent-style-name="Standard">
      <style:paragraph-properties fo:text-align="right" style:justify-single-word="false"/>
      <style:text-properties style:font-name="Times New Roman" fo:font-size="12pt" officeooo:rsid="00112e03" officeooo:paragraph-rsid="00112e03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iography</text:p>
      <text:p text:style-name="P2"/>
      <text:p text:style-name="P2">This is a sample biography. Replace the text here with what you would like your profile bio to say. If you want to add more paragraphs just add two br tags like so</text:p>
      <text:p text:style-name="P2"/>
      <text:p text:style-name="P3">Sample Subtitle</text:p>
      <text:p text:style-name="P2"/>
      <text:p text:style-name="P2">in order to create another body of text. Alternatively you can duplicate the content-body div</text:p>
      <text:p text:style-name="P2"/>
      <text:p text:style-name="P4">like this which achieves the same effect and is useful if you want to insert images in your biography with text above and below it. For example…</text:p>
      <text:p text:style-name="P2"/>
      <text:p text:style-name="P5"><draw:frame draw:style-name="fr1" draw:name="Image1" text:anchor-type="as-char" svg:width="5.3335in" svg:height="3in" draw:z-index="0"><draw:image xlink:href="Pictures/1000000000000500000002D03BEAED8B.png" xlink:type="simple" xlink:show="embed" xlink:actuate="onLoad" draw:mime-type="image/png"/></draw:frame></text:p>
      <text:p text:style-name="P2"/>
      <text:p text:style-name="P4">Now here is some text below the image! Feel free to replace the "My Biography" default text with your own biography title.</text:p>
      <text:p text:style-name="P4"/>
      <text:p text:style-name="P4">This paragraph is left aligned.</text:p>
      <text:p text:style-name="P4"/>
      <text:p text:style-name="P5">This paragraph is center aligned.</text:p>
      <text:p text:style-name="P4"/>
      <text:p text:style-name="P6">This paragraph is right aligned.</text:p>
      <text:p text:style-name="P4"/>
      <text:p text:style-name="P4">Get creative with the layout! <text:span text:style-name="T1">(˶ᵔ ᵕ ᵔ˶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08:52:48.972771900</meta:creation-date>
    <dc:date>2026-05-07T09:01:48.672497200</dc:date>
    <meta:editing-duration>PT9M</meta:editing-duration>
    <meta:editing-cycles>1</meta:editing-cycles>
    <meta:document-statistic meta:table-count="0" meta:image-count="1" meta:object-count="0" meta:page-count="1" meta:paragraph-count="11" meta:word-count="124" meta:character-count="684" meta:non-whitespace-character-count="570"/>
    <meta:generator>LibreOffice/26.2.1.2$Windows_X86_64 LibreOffice_project/620$Build-2</meta:generator>
  </office:meta>
</office:document-meta>
</file>